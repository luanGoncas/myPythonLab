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1000001FE9D36B6CFEB3FB0B6.png" manifest:media-type="image/png"/>
  <manifest:file-entry manifest:full-path="Pictures/1000000000000131000001FEEA4E4AD44216CE59.png" manifest:media-type="image/png"/>
  <manifest:file-entry manifest:full-path="Pictures/100000000000037900000233593DBEA02114DA6D.png" manifest:media-type="image/png"/>
  <manifest:file-entry manifest:full-path="Pictures/1000000000000260000002823AA2DBC12C690234.png" manifest:media-type="image/png"/>
  <manifest:file-entry manifest:full-path="Pictures/1000000000000123000001FE95227617038EEBA3.png" manifest:media-type="image/png"/>
  <manifest:file-entry manifest:full-path="Pictures/100000010000020E000000D050BC917BCA95AB65.png" manifest:media-type="image/png"/>
  <manifest:file-entry manifest:full-path="Pictures/10000000000001AA0000017493177B158A1E245C.png" manifest:media-type="image/png"/>
  <manifest:file-entry manifest:full-path="Pictures/10000000000001B6000001E451B433FAE2DAAF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everMind" svg:font-family="NeverMind, sans-serif, 'Microsoft YaHei', 'PingFang SC', 'Microsoft JhengHei', 'Apple Color Emoji', 'Segoe UI Emoji', 'Segoe UI Symbol', 'Noto Color Emoj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paragraph-rsid="0030e927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06a3b2" officeooo:paragraph-rsid="0006a3b2" style:font-weight-asian="bold" style:font-weight-complex="bold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style:text-underline-style="none" fo:font-weight="bold" officeooo:rsid="0006a3b2" officeooo:paragraph-rsid="0006a3b2" style:font-weight-asian="bold" style:font-weight-complex="bold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style:text-underline-style="none" fo:font-weight="bold" officeooo:rsid="0011004e" officeooo:paragraph-rsid="0011004e" style:font-weight-asian="bold" style:font-weight-complex="bold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style:text-underline-style="none" fo:font-weight="bold" officeooo:rsid="001224ea" officeooo:paragraph-rsid="001224ea" style:font-weight-asian="bold" style:font-weight-complex="bold"/>
    </style:style>
    <style:style style:name="P6" style:family="paragraph" style:parent-style-name="Standard" style:list-style-name="L2">
      <style:paragraph-properties fo:line-height="150%" fo:text-align="justify" style:justify-single-word="false"/>
      <style:text-properties style:font-name="Times New Roman" fo:font-size="12pt" style:text-underline-style="none" fo:font-weight="normal" officeooo:rsid="0006a3b2" officeooo:paragraph-rsid="0006a3b2" style:font-weight-asian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2pt" style:text-underline-style="none" fo:font-weight="normal" officeooo:rsid="0006a3b2" officeooo:paragraph-rsid="0006a3b2" style:font-weight-asian="normal" style:font-weight-complex="normal"/>
    </style:style>
    <style:style style:name="P8" style:family="paragraph" style:parent-style-name="Standard" style:list-style-name="L3">
      <style:paragraph-properties fo:line-height="150%" fo:text-align="justify" style:justify-single-word="false"/>
      <style:text-properties style:font-name="Times New Roman" fo:font-size="12pt" style:text-underline-style="none" fo:font-weight="normal" officeooo:rsid="0006a3b2" officeooo:paragraph-rsid="0006a3b2" style:font-weight-asian="normal" style:font-weight-complex="normal"/>
    </style:style>
    <style:style style:name="P9" style:family="paragraph" style:parent-style-name="Standard" style:list-style-name="L4">
      <style:paragraph-properties fo:line-height="150%" fo:text-align="justify" style:justify-single-word="false"/>
      <style:text-properties style:font-name="Times New Roman" fo:font-size="12pt" style:text-underline-style="none" fo:font-weight="normal" officeooo:rsid="0006a3b2" officeooo:paragraph-rsid="0006a3b2" style:font-weight-asian="normal" style:font-weight-complex="normal"/>
    </style:style>
    <style:style style:name="P10" style:family="paragraph" style:parent-style-name="Standard" style:list-style-name="L5">
      <style:paragraph-properties fo:line-height="150%" fo:text-align="justify" style:justify-single-word="false"/>
      <style:text-properties style:font-name="Times New Roman" fo:font-size="12pt" style:text-underline-style="none" fo:font-weight="normal" officeooo:rsid="0006a3b2" officeooo:paragraph-rsid="0006a3b2" style:font-weight-asian="normal" style:font-weight-complex="normal"/>
    </style:style>
    <style:style style:name="P11" style:family="paragraph" style:parent-style-name="Standard" style:list-style-name="L23">
      <style:paragraph-properties fo:line-height="150%" fo:text-align="justify" style:justify-single-word="false"/>
      <style:text-properties style:font-name="Times New Roman" fo:font-size="12pt" style:text-underline-style="none" fo:font-weight="normal" officeooo:rsid="0006a3b2" officeooo:paragraph-rsid="0006a3b2" style:font-weight-asian="normal" style:font-weight-complex="normal"/>
    </style:style>
    <style:style style:name="P12" style:family="paragraph" style:parent-style-name="Standard" style:list-style-name="L25">
      <style:paragraph-properties fo:line-height="150%" fo:text-align="justify" style:justify-single-word="false"/>
      <style:text-properties style:font-name="Times New Roman" fo:font-size="12pt" style:text-underline-style="none" fo:font-weight="normal" officeooo:rsid="0006a3b2" officeooo:paragraph-rsid="0006a3b2" style:font-weight-asian="normal" style:font-weight-complex="normal"/>
    </style:style>
    <style:style style:name="P13" style:family="paragraph" style:parent-style-name="Standard" style:list-style-name="L26">
      <style:paragraph-properties fo:line-height="150%" fo:text-align="justify" style:justify-single-word="false"/>
      <style:text-properties style:font-name="Times New Roman" fo:font-size="12pt" style:text-underline-style="none" fo:font-weight="normal" officeooo:rsid="0006a3b2" officeooo:paragraph-rsid="0006a3b2" style:font-weight-asian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2pt" style:text-underline-style="none" fo:font-weight="normal" officeooo:rsid="0006a3b2" officeooo:paragraph-rsid="00273b73" style:font-weight-asian="normal" style:font-weight-complex="normal"/>
    </style:style>
    <style:style style:name="P15" style:family="paragraph" style:parent-style-name="Standard" style:list-style-name="L29">
      <style:paragraph-properties fo:line-height="150%" fo:text-align="justify" style:justify-single-word="false"/>
      <style:text-properties style:font-name="Times New Roman" fo:font-size="12pt" style:text-underline-style="none" fo:font-weight="normal" officeooo:rsid="0006a3b2" officeooo:paragraph-rsid="00273b73" style:font-weight-asian="normal" style:font-weight-complex="normal"/>
    </style:style>
    <style:style style:name="P16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12pt" style:text-underline-style="none" fo:font-weight="normal" officeooo:rsid="0011004e" officeooo:paragraph-rsid="00116fb3" style:font-weight-asian="normal" style:font-weight-complex="normal"/>
    </style:style>
    <style:style style:name="P17" style:family="paragraph" style:parent-style-name="Standard" style:list-style-name="L26">
      <style:paragraph-properties fo:line-height="150%" fo:text-align="justify" style:justify-single-word="false"/>
      <style:text-properties style:font-name="Times New Roman" fo:font-size="12pt" style:text-underline-style="none" fo:font-weight="normal" officeooo:rsid="002728f9" officeooo:paragraph-rsid="002728f9" style:font-weight-asian="normal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2pt" style:text-underline-style="none" fo:font-weight="normal" officeooo:rsid="002728f9" officeooo:paragraph-rsid="002728f9" style:font-weight-asian="normal" style:font-weight-complex="normal"/>
    </style:style>
    <style:style style:name="P19" style:family="paragraph" style:parent-style-name="Standard" style:list-style-name="L27">
      <style:paragraph-properties fo:line-height="150%" fo:text-align="justify" style:justify-single-word="false"/>
      <style:text-properties style:font-name="Times New Roman" fo:font-size="12pt" style:text-underline-style="none" fo:font-weight="normal" officeooo:rsid="002728f9" officeooo:paragraph-rsid="002728f9" style:font-weight-asian="normal" style:font-weight-complex="normal"/>
    </style:style>
    <style:style style:name="P20" style:family="paragraph" style:parent-style-name="Standard" style:list-style-name="L28">
      <style:paragraph-properties fo:line-height="150%" fo:text-align="justify" style:justify-single-word="false"/>
      <style:text-properties style:font-name="Times New Roman" fo:font-size="12pt" style:text-underline-style="none" fo:font-weight="normal" officeooo:rsid="002728f9" officeooo:paragraph-rsid="002728f9" style:font-weight-asian="normal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style:text-underline-style="none" officeooo:paragraph-rsid="00116fb3" style:font-style-asian="normal" style:font-style-complex="normal"/>
    </style:style>
    <style:style style:name="P22" style:family="paragraph" style:parent-style-name="Standard" style:list-style-name="L12">
      <style:paragraph-properties fo:line-height="150%" fo:text-align="justify" style:justify-single-word="false"/>
      <style:text-properties style:font-name="Times New Roman" fo:font-size="12pt" fo:font-style="normal" style:text-underline-style="none" officeooo:rsid="00116fb3" officeooo:paragraph-rsid="00116fb3" style:font-style-asian="normal" style:font-style-complex="normal"/>
    </style:style>
    <style:style style:name="P23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font-style="normal" style:text-underline-style="none" fo:font-weight="bold" officeooo:rsid="0011004e" officeooo:paragraph-rsid="0011004e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officeooo:paragraph-rsid="0006a3b2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officeooo:paragraph-rsid="0010d421"/>
    </style:style>
    <style:style style:name="P26" style:family="paragraph" style:parent-style-name="Standard" style:list-style-name="L6">
      <style:paragraph-properties fo:line-height="150%" fo:text-align="justify" style:justify-single-word="false"/>
      <style:text-properties style:font-name="Times New Roman" officeooo:paragraph-rsid="000db042"/>
    </style:style>
    <style:style style:name="P27" style:family="paragraph" style:parent-style-name="Standard" style:list-style-name="L7">
      <style:paragraph-properties fo:line-height="150%" fo:text-align="justify" style:justify-single-word="false"/>
      <style:text-properties style:font-name="Times New Roman" officeooo:paragraph-rsid="000db042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Times New Roman" officeooo:paragraph-rsid="0017a2cb"/>
    </style:style>
    <style:style style:name="P29" style:family="paragraph" style:parent-style-name="Standard" style:list-style-name="L8">
      <style:paragraph-properties fo:line-height="150%" fo:text-align="justify" style:justify-single-word="false"/>
      <style:text-properties style:font-name="Times New Roman" officeooo:paragraph-rsid="000db042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" officeooo:paragraph-rsid="000db042"/>
    </style:style>
    <style:style style:name="P31" style:family="paragraph" style:parent-style-name="Standard" style:list-style-name="L9">
      <style:paragraph-properties fo:line-height="150%" fo:text-align="justify" style:justify-single-word="false"/>
      <style:text-properties style:font-name="Times New Roman" officeooo:paragraph-rsid="000db042"/>
    </style:style>
    <style:style style:name="P32" style:family="paragraph" style:parent-style-name="Standard" style:list-style-name="L10">
      <style:paragraph-properties fo:line-height="150%" fo:text-align="justify" style:justify-single-word="false"/>
      <style:text-properties style:font-name="Times New Roman" officeooo:paragraph-rsid="000db042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Times New Roman" officeooo:paragraph-rsid="0011004e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Times New Roman" officeooo:paragraph-rsid="00116fb3"/>
    </style:style>
    <style:style style:name="P35" style:family="paragraph" style:parent-style-name="Standard" style:list-style-name="L11">
      <style:paragraph-properties fo:line-height="150%" fo:text-align="justify" style:justify-single-word="false"/>
      <style:text-properties style:font-name="Times New Roman" officeooo:paragraph-rsid="00116fb3"/>
    </style:style>
    <style:style style:name="P36" style:family="paragraph" style:parent-style-name="Standard" style:list-style-name="L12">
      <style:paragraph-properties fo:line-height="150%" fo:text-align="justify" style:justify-single-word="false"/>
      <style:text-properties style:font-name="Times New Roman" officeooo:paragraph-rsid="00116fb3"/>
    </style:style>
    <style:style style:name="P37" style:family="paragraph" style:parent-style-name="Standard" style:list-style-name="L13">
      <style:paragraph-properties fo:line-height="150%" fo:text-align="justify" style:justify-single-word="false"/>
      <style:text-properties style:font-name="Times New Roman" officeooo:paragraph-rsid="0011004e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Times New Roman" officeooo:paragraph-rsid="001ebfb8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Times New Roman" officeooo:paragraph-rsid="001224ea"/>
    </style:style>
    <style:style style:name="P40" style:family="paragraph" style:parent-style-name="Standard" style:list-style-name="L14">
      <style:paragraph-properties fo:line-height="150%" fo:text-align="justify" style:justify-single-word="false"/>
      <style:text-properties style:font-name="Times New Roman" officeooo:paragraph-rsid="001224ea"/>
    </style:style>
    <style:style style:name="P41" style:family="paragraph" style:parent-style-name="Standard" style:list-style-name="L15">
      <style:paragraph-properties fo:line-height="150%" fo:text-align="justify" style:justify-single-word="false"/>
      <style:text-properties style:font-name="Times New Roman" officeooo:paragraph-rsid="001224ea"/>
    </style:style>
    <style:style style:name="P42" style:family="paragraph" style:parent-style-name="Standard" style:list-style-name="L16">
      <style:paragraph-properties fo:line-height="150%" fo:text-align="justify" style:justify-single-word="false"/>
      <style:text-properties style:font-name="Times New Roman" officeooo:paragraph-rsid="001224ea"/>
    </style:style>
    <style:style style:name="P43" style:family="paragraph" style:parent-style-name="Standard" style:list-style-name="L17">
      <style:paragraph-properties fo:line-height="150%" fo:text-align="justify" style:justify-single-word="false"/>
      <style:text-properties style:font-name="Times New Roman" officeooo:paragraph-rsid="001224ea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Times New Roman" officeooo:paragraph-rsid="0012820b"/>
    </style:style>
    <style:style style:name="P45" style:family="paragraph" style:parent-style-name="Standard" style:list-style-name="L18">
      <style:paragraph-properties fo:line-height="150%" fo:text-align="justify" style:justify-single-word="false"/>
      <style:text-properties style:font-name="Times New Roman" officeooo:paragraph-rsid="0012820b"/>
    </style:style>
    <style:style style:name="P46" style:family="paragraph" style:parent-style-name="Standard" style:list-style-name="L19">
      <style:paragraph-properties fo:line-height="150%" fo:text-align="justify" style:justify-single-word="false"/>
      <style:text-properties style:font-name="Times New Roman" officeooo:paragraph-rsid="0012820b"/>
    </style:style>
    <style:style style:name="P47" style:family="paragraph" style:parent-style-name="Standard" style:list-style-name="L19">
      <style:paragraph-properties fo:line-height="150%" fo:text-align="justify" style:justify-single-word="false"/>
      <style:text-properties style:font-name="Times New Roman" officeooo:paragraph-rsid="0012985c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Times New Roman" officeooo:paragraph-rsid="0012985c"/>
    </style:style>
    <style:style style:name="P49" style:family="paragraph" style:parent-style-name="Standard" style:list-style-name="L20">
      <style:paragraph-properties fo:line-height="150%" fo:text-align="justify" style:justify-single-word="false"/>
      <style:text-properties style:font-name="Times New Roman" officeooo:paragraph-rsid="0012985c"/>
    </style:style>
    <style:style style:name="P50" style:family="paragraph" style:parent-style-name="Standard" style:list-style-name="L21">
      <style:paragraph-properties fo:line-height="150%" fo:text-align="justify" style:justify-single-word="false"/>
      <style:text-properties style:font-name="Times New Roman" officeooo:paragraph-rsid="0012985c"/>
    </style:style>
    <style:style style:name="P51" style:family="paragraph" style:parent-style-name="Standard" style:list-style-name="L22">
      <style:paragraph-properties fo:line-height="150%" fo:text-align="justify" style:justify-single-word="false"/>
      <style:text-properties style:font-name="Times New Roman" officeooo:paragraph-rsid="0012985c"/>
    </style:style>
    <style:style style:name="P52" style:family="paragraph" style:parent-style-name="Standard" style:list-style-name="L24">
      <style:paragraph-properties fo:line-height="150%" fo:text-align="justify" style:justify-single-word="false"/>
      <style:text-properties style:font-name="Times New Roman" officeooo:paragraph-rsid="0006a3b2"/>
    </style:style>
    <style:style style:name="P53" style:family="paragraph" style:parent-style-name="Standard" style:list-style-name="L24">
      <style:paragraph-properties fo:line-height="150%" fo:text-align="justify" style:justify-single-word="false"/>
      <style:text-properties style:font-name="Times New Roman" officeooo:paragraph-rsid="0022e655"/>
    </style:style>
    <style:style style:name="P54" style:family="paragraph" style:parent-style-name="Standard" style:list-style-name="L24">
      <style:paragraph-properties fo:line-height="150%" fo:text-align="justify" style:justify-single-word="false"/>
      <style:text-properties style:font-name="Times New Roman" officeooo:paragraph-rsid="00237bfa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Times New Roman" officeooo:paragraph-rsid="00237bfa"/>
    </style:style>
    <style:style style:name="P56" style:family="paragraph" style:parent-style-name="Standard">
      <style:paragraph-properties fo:line-height="150%" fo:text-align="justify" style:justify-single-word="false"/>
      <style:text-properties style:font-name="Times New Roman" officeooo:paragraph-rsid="002dde23"/>
    </style:style>
    <style:style style:name="P57" style:family="paragraph" style:parent-style-name="Standard">
      <style:paragraph-properties fo:line-height="150%" fo:text-align="justify" style:justify-single-word="false"/>
      <style:text-properties style:font-name="Times New Roman" officeooo:rsid="000db042" officeooo:paragraph-rsid="000db042"/>
    </style:style>
    <style:style style:name="P58" style:family="paragraph" style:parent-style-name="Standard" style:list-style-name="L9">
      <style:paragraph-properties fo:line-height="150%" fo:text-align="justify" style:justify-single-word="false"/>
      <style:text-properties style:font-name="Times New Roman" officeooo:rsid="000db042" officeooo:paragraph-rsid="000db042"/>
    </style:style>
    <style:style style:name="P59" style:family="paragraph" style:parent-style-name="Standard" style:list-style-name="L11">
      <style:paragraph-properties fo:line-height="150%" fo:text-align="justify" style:justify-single-word="false"/>
      <style:text-properties style:font-name="Times New Roman" officeooo:rsid="0011004e" officeooo:paragraph-rsid="00116fb3"/>
    </style:style>
    <style:style style:name="P60" style:family="paragraph" style:parent-style-name="Standard" style:list-style-name="L1">
      <style:paragraph-properties fo:line-height="150%" fo:text-align="justify" style:justify-single-word="false"/>
      <style:text-properties style:font-name="Times New Roman" fo:font-weight="bold" officeooo:rsid="0011004e" officeooo:paragraph-rsid="0011004e" style:font-weight-asian="bold" style:font-weight-complex="bold"/>
    </style:style>
    <style:style style:name="P61" style:family="paragraph" style:parent-style-name="Standard" style:list-style-name="L19">
      <style:paragraph-properties fo:line-height="150%" fo:text-align="justify" style:justify-single-word="false"/>
      <style:text-properties style:font-name="Times New Roman" officeooo:rsid="0012820b" officeooo:paragraph-rsid="0012820b"/>
    </style:style>
    <style:style style:name="P62" style:family="paragraph" style:parent-style-name="Standard" style:list-style-name="L20">
      <style:paragraph-properties fo:line-height="150%" fo:text-align="justify" style:justify-single-word="false"/>
      <style:text-properties style:font-name="Times New Roman" officeooo:rsid="0012985c" officeooo:paragraph-rsid="0012985c"/>
    </style:style>
    <style:style style:name="P63" style:family="paragraph" style:parent-style-name="Standard" style:list-style-name="L21">
      <style:paragraph-properties fo:line-height="150%" fo:text-align="justify" style:justify-single-word="false"/>
      <style:text-properties style:font-name="Times New Roman" officeooo:rsid="0012985c" officeooo:paragraph-rsid="0012985c"/>
    </style:style>
    <style:style style:name="P64" style:family="paragraph" style:parent-style-name="Standard">
      <style:paragraph-properties fo:line-height="150%" fo:text-align="justify" style:justify-single-word="false"/>
      <style:text-properties style:font-name="Times New Roman" officeooo:rsid="0012985c" officeooo:paragraph-rsid="0012985c"/>
    </style:style>
    <style:style style:name="P65" style:family="paragraph" style:parent-style-name="Standard" style:list-style-name="L22">
      <style:paragraph-properties fo:line-height="150%" fo:text-align="justify" style:justify-single-word="false"/>
      <style:text-properties style:font-name="Times New Roman" officeooo:rsid="0012985c" officeooo:paragraph-rsid="0012985c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officeooo:rsid="000db042"/>
    </style:style>
    <style:style style:name="T3" style:family="text">
      <style:text-properties fo:font-size="12pt" style:text-underline-style="none"/>
    </style:style>
    <style:style style:name="T4" style:family="text">
      <style:text-properties fo:font-size="12pt" style:text-underline-style="none" fo:font-weight="normal" style:font-weight-asian="normal" style:font-weight-complex="normal"/>
    </style:style>
    <style:style style:name="T5" style:family="text">
      <style:text-properties fo:font-size="12pt" style:text-underline-style="none" fo:font-weight="normal" officeooo:rsid="0006a3b2" style:font-weight-asian="normal" style:font-weight-complex="normal"/>
    </style:style>
    <style:style style:name="T6" style:family="text">
      <style:text-properties fo:font-size="12pt" style:text-underline-style="none" fo:font-weight="normal" officeooo:rsid="0007f0d7" style:font-weight-asian="normal" style:font-weight-complex="normal"/>
    </style:style>
    <style:style style:name="T7" style:family="text">
      <style:text-properties fo:font-size="12pt" style:text-underline-style="none" fo:font-weight="normal" officeooo:rsid="0011004e" style:font-weight-asian="normal" style:font-weight-complex="normal"/>
    </style:style>
    <style:style style:name="T8" style:family="text">
      <style:text-properties fo:font-size="12pt" style:text-underline-style="none" fo:font-weight="normal" officeooo:rsid="001224ea" style:font-weight-asian="normal" style:font-weight-complex="normal"/>
    </style:style>
    <style:style style:name="T9" style:family="text">
      <style:text-properties fo:font-size="12pt" style:text-underline-style="none" fo:font-weight="normal" officeooo:rsid="002c9e0c" style:font-weight-asian="normal" style:font-weight-complex="normal"/>
    </style:style>
    <style:style style:name="T10" style:family="text">
      <style:text-properties fo:font-size="12pt" fo:font-style="italic" style:text-underline-style="none" style:font-style-asian="italic" style:font-style-complex="italic"/>
    </style:style>
    <style:style style:name="T11" style:family="text">
      <style:text-properties fo:font-size="12pt" fo:font-style="italic" style:text-underline-style="none" fo:font-weight="normal" officeooo:rsid="0011004e" style:font-style-asian="italic" style:font-weight-asian="normal" style:font-style-complex="italic" style:font-weight-complex="normal"/>
    </style:style>
    <style:style style:name="T12" style:family="text">
      <style:text-properties fo:font-size="12pt" fo:font-style="normal" style:text-underline-style="none" style:font-style-asian="normal" style:font-style-complex="normal"/>
    </style:style>
    <style:style style:name="T13" style:family="text">
      <style:text-properties fo:font-size="12pt" fo:font-style="normal" style:text-underline-style="none" officeooo:rsid="00116fb3" style:font-style-asian="normal" style:font-style-complex="normal"/>
    </style:style>
    <style:style style:name="T14" style:family="text">
      <style:text-properties fo:font-size="12pt" fo:font-style="normal" style:text-underline-style="none" fo:font-weight="normal" officeooo:rsid="0011004e" style:font-style-asian="normal" style:font-weight-asian="normal" style:font-style-complex="normal" style:font-weight-complex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fo:font-weight="normal" style:font-size-asian="12pt" style:font-size-complex="12pt"/>
    </style:style>
    <style:style style:name="T17" style:family="text">
      <style:text-properties fo:font-size="12pt" fo:font-weight="normal" officeooo:rsid="0012985c" style:font-size-asian="12pt" style:font-size-complex="12pt"/>
    </style:style>
    <style:style style:name="T18" style:family="text">
      <style:text-properties officeooo:rsid="0011004e"/>
    </style:style>
    <style:style style:name="T19" style:family="text">
      <style:text-properties officeooo:rsid="001224ea"/>
    </style:style>
    <style:style style:name="T20" style:family="text">
      <style:text-properties officeooo:rsid="0012820b"/>
    </style:style>
    <style:style style:name="T21" style:family="text">
      <style:text-properties officeooo:rsid="0012985c"/>
    </style:style>
    <style:style style:name="T22" style:family="text">
      <style:text-properties officeooo:rsid="0020b95a"/>
    </style:style>
    <style:style style:name="T23" style:family="text">
      <style:text-properties officeooo:rsid="0022e655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fo:font-size="12pt" style:text-underline-style="none" fo:font-weight="normal" officeooo:rsid="0006a3b2" style:font-weight-asian="normal" style:font-weight-complex="normal"/>
    </style:style>
    <style:style style:name="T26" style:family="text">
      <style:text-properties officeooo:rsid="00237bfa"/>
    </style:style>
    <style:style style:name="T27" style:family="text">
      <style:text-properties officeooo:rsid="002505ce"/>
    </style:style>
    <style:style style:name="T28" style:family="text">
      <style:text-properties officeooo:rsid="0026a59d"/>
    </style:style>
    <style:style style:name="T29" style:family="text">
      <style:text-properties officeooo:rsid="0026cff8"/>
    </style:style>
    <style:style style:name="T30" style:family="text">
      <style:text-properties officeooo:rsid="002acd89"/>
    </style:style>
    <style:style style:name="T31" style:family="text">
      <style:text-properties officeooo:rsid="002da752"/>
    </style:style>
    <style:style style:name="T32" style:family="text">
      <style:text-properties officeooo:rsid="002dde23"/>
    </style:style>
    <style:style style:name="T33" style:family="text">
      <style:text-properties officeooo:rsid="002e1e12"/>
    </style:style>
    <style:style style:name="T34" style:family="text">
      <style:text-properties officeooo:rsid="002e9579"/>
    </style:style>
    <style:style style:name="T35" style:family="text">
      <style:text-properties officeooo:rsid="002f21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 Básico de Python</text:p>
      <text:list xml:id="list2992004267" text:style-name="L1">
        <text:list-item>
          <text:p text:style-name="P3">Introdução</text:p>
        </text:list-item>
      </text:list>
      <text:p text:style-name="P24"><text:span text:style-name="T5"><text:tab/></text:span><text:span text:style-name="T1">Programar é basicamente dar instruções a um computador de forma que ele entenda</text:span><text:span text:style-name="T5">. Todo programa de computador é feito de instruções básicas que se encaixam como pecinhas de montar. Alguns comandos básicos que, apesar de simples para humanos, precisam ser detalhados para um computador, são:</text:span></text:p>
      <text:list xml:id="list3132855912" text:style-name="L2">
        <text:list-item>
          <text:p text:style-name="P6">“Faça isso, então faça aquilo”;</text:p>
        </text:list-item>
        <text:list-item>
          <text:p text:style-name="P6">“Se isso for verdadeiro, faça isso, caso contrário, faça aquilo”;</text:p>
        </text:list-item>
        <text:list-item>
          <text:p text:style-name="P6">“Faça isso 27 vezes”;</text:p>
        </text:list-item>
        <text:list-item>
          <text:p text:style-name="P6">“Faça isso até determinada condição ser verdade”</text:p>
        </text:list-item>
      </text:list>
      <text:p text:style-name="P7"><text:tab/>É possível combinar diversos desses blocos, dessas pecinhas, para realizar tarefas mais complexas. No final das contas, programação é uma tarefa <text:s/>que envolve criatividade, assim como pintura, escrita, costura, construção LEGO, entre outras. Assim como num quadro branco, <text:span text:style-name="T30">a</text:span> programação possui algumas restrições, mas com possibilidades infinitas.</text:p>
      <text:p text:style-name="P7"><text:tab/>Algumas atividades a serem manejadas por instruções de um computador são:</text:p>
      <text:list xml:id="list1458419686" text:style-name="L3">
        <text:list-item>
          <text:p text:style-name="P8">Processar números</text:p>
        </text:list-item>
        <text:list-item>
          <text:p text:style-name="P8">Modificar texto</text:p>
        </text:list-item>
        <text:list-item>
          <text:p text:style-name="P8">Buscar informações em arquivos</text:p>
        </text:list-item>
        <text:list-item>
          <text:p text:style-name="P8">Se comunicar com outros computadores na Internet</text:p>
        </text:list-item>
      </text:list>
      <text:p text:style-name="P24"><text:span text:style-name="T5"><text:tab/>Quando falamos em Python, estamos nos referindo a, possivelmente, duas coisas: </text:span><text:span text:style-name="T9">a</text:span><text:span text:style-name="T4"> uma linguagem de programação, </text:span><text:span text:style-name="T6">ou seja, ao conjunto de</text:span><text:span text:style-name="T4"> regras, </text:span><text:span text:style-name="T6">palavras e símbolos</text:span><text:span text:style-name="T4"> </text:span><text:span text:style-name="T6">que compõem um</text:span><text:span text:style-name="T4"> código Python</text:span><text:span text:style-name="T5">; </text:span><text:span text:style-name="T6">ou ao interpretador de programas Python, que analisa se determinado código Python é válido ou não. Um código Python é construído através de instruções dadas em um editor de texto que tenha a extensão .py</text:span></text:p>
      <text:list xml:id="list165952508672210" text:continue-list="list2992004267" text:style-name="L1">
        <text:list-item>
          <text:p text:style-name="P3">Valores, Operadores e Expressões</text:p>
        </text:list-item>
      </text:list>
      <text:p text:style-name="P25"><text:span text:style-name="T5"><text:tab/></text:span>A linguagem de programação Python, assim como <text:span text:style-name="T32">em</text:span> um idioma, possui regras que, se usadas em conjunto, formam expressões e instruções para fazerem sentido. Os programas desenvolvidos em Python envolvem a confecção de valores, operadores, declarações e expressões. <text:span text:style-name="T5">Ao iniciar o Python no terminal, escreva o seguinte:</text:span></text:p>
      <text:list xml:id="list67338843" text:style-name="L4">
        <text:list-item>
          <text:p text:style-name="P9">2 + 2</text:p>
        </text:list-item>
      </text:list>
      <text:p text:style-name="P7"><text:tab/>Ao executar esse código, seja no terminal ou em um arquivo de formato .py, o seguinte é exibido na tela:</text:p>
      <text:list xml:id="list926804389" text:style-name="L5">
        <text:list-item>
          <text:p text:style-name="P10">4</text:p>
        </text:list-item>
      </text:list>
      <text:p text:style-name="P56"><text:span text:style-name="T5"><text:tab/>Em Python, 2 + 2 é chamado de expressão,</text:span> o tipo mais básico de instrução na linguagem Python. Uma expressão consiste de valores e operadores que podem retornar um único valor. Nessa <text:soft-page-break/>expressão, o valor é 2 e o operador é +, e o valor retornado é 4. Um operador é o elemento de uma expressão que atua sobre os valores para realizar uma instrução.</text:p>
      <text:p text:style-name="P56"><text:tab/>Isso quer dizer que você consegue usar expressões em qualquer lugar do código no qual você também usaria um valor. Um valor único sem operadores também é considerado uma expressão, apesar de retornar apenas a si mesmo. Exemplo:</text:p>
      <text:list xml:id="list914266004" text:style-name="L6">
        <text:list-item>
          <text:p text:style-name="P26"><text:span text:style-name="T2">2</text:span></text:p>
        </text:list-item>
      </text:list>
      <text:p text:style-name="P57"><text:tab/>Ao executar no terminal, retorna isso:</text:p>
      <text:list xml:id="list2384751962" text:style-name="L7">
        <text:list-item>
          <text:p text:style-name="P27"><text:span text:style-name="T2">2</text:span></text:p>
        </text:list-item>
      </text:list>
      <text:p text:style-name="P28"><text:span text:style-name="T2"><text:tab/></text:span>Tudo o que não for uma expressão, em Python, é uma declaração. <text:span text:style-name="T31">Tanto expressões quanto declarações, em Python, são instruções. A diferença de uma expressão para uma declaração, é que a expressão retorna um valor, enquanto que a declaração não. </text:span><text:s/>Uma declaração não retorna um valor, mas pode ter uma expressão como parte dela.</text:p>
      <text:p text:style-name="P28"><text:span text:style-name="T2"><text:tab/>Programar também envolve operações matemáticas bastante familiares, com cada uma delas tendo seus respectivos operadores.</text:span></text:p>
      <text:list xml:id="list3041964451" text:style-name="L8">
        <text:list-item>
          <text:p text:style-name="P29"><text:span text:style-name="T2">Adição: </text:span>Operação básica de somar números, como já mostrado. Assim como na matemática convencional, o operador de adição é esse <text:span text:style-name="T2">+</text:span></text:p>
        </text:list-item>
        <text:list-item>
          <text:p text:style-name="P29"><text:span text:style-name="T2">Subtração: </text:span>Operação básica de subtrair número<text:span text:style-name="T2">s. </text:span>Assim como na matemática convencional, o operador de subtração é esse -</text:p>
        </text:list-item>
        <text:list-item>
          <text:p text:style-name="P29"><text:span text:style-name="T2">Multiplicação: </text:span>Operação básica de multiplicar números. O operador de multiplicação, na linguagem Python, é esse *</text:p>
        </text:list-item>
        <text:list-item>
          <text:p text:style-name="P29"><text:span text:style-name="T2">Divisão: </text:span>Operação básica de dividir números. O operador de divisão, na linguagem Python, é esse /</text:p>
        </text:list-item>
        <text:list-item>
          <text:p text:style-name="P29"><text:span text:style-name="T2">Divisão inteira: </text:span>A divisão inteira é como a divisão comum, com a diferença de que o resultado é arredondado para baixo. O operador de divisão inteira, na linguagem Python, é esse //</text:p>
        </text:list-item>
        <text:list-item>
          <text:p text:style-name="P29"><text:span text:style-name="T2">Módulo: </text:span>O módulo de dois números é basicamente o resto de uma divisão. O módulo entre 14 e 4 é 2, pois 14 dividido por 4 é 3, no qual o resto é 2. O operador de módulo, na linguagem Python, é esse %</text:p>
        </text:list-item>
        <text:list-item>
          <text:p text:style-name="P29"><text:span text:style-name="T2">Exponenciação: </text:span>Exponenciação (ou "elevado a") é uma operação que envolve a multiplicação de um número por ele mesmo repetidas vezes. Dois elevado a quatro é escrito 2⁴, que basicamente é 2 multiplicado 4 vezes, que é 16. O operador de exponenciação, na linguagem Python, é esse **</text:p>
        </text:list-item>
      </text:list>
      <text:p text:style-name="P30"><text:span text:style-name="T2"><text:tab/>A ordem de operações (também chamada de precedência) em Python é similar a matemática convencional. </text:span>O operador de exponenciação (**) possui precedência maior sobre os operadores de <text:soft-page-break/>módulo (%), divisão (/, //) e multiplicação (*). Após os operadores de módulo, divisão e multiplicação, vem os operadores de adição (+) e subtração (-), da esquerda para a direita.</text:p>
      <text:p text:style-name="P30"><text:tab/>É possível usar os parênteses () para sobrescrever a precedência natural dos operadores, <text:span text:style-name="T2">e e</text:span>spaços em branco não fazem diferença na ordem de precedência. Exemplos de expressões utilizando precedência, com seus valores retornados:</text:p>
      <text:list xml:id="list853152754" text:style-name="L9">
        <text:list-item>
          <text:p text:style-name="P31">2 + 3 * 6</text:p>
          <text:list>
            <text:list-item>
              <text:p text:style-name="P58">20</text:p>
            </text:list-item>
            <text:list-item>
              <text:p text:style-name="P58">A operação de multiplicação foi feita primeiro, por conta da precedência</text:p>
            </text:list-item>
          </text:list>
        </text:list-item>
        <text:list-item>
          <text:p text:style-name="P31">(2 + 3) * 6</text:p>
          <text:list>
            <text:list-item>
              <text:p text:style-name="P58">30</text:p>
            </text:list-item>
            <text:list-item>
              <text:p text:style-name="P58">A operação de soma foi feita primeiro, por conta dos parênteses que sobrepôs a precedência da multiplicação</text:p>
            </text:list-item>
          </text:list>
        </text:list-item>
        <text:list-item>
          <text:p text:style-name="P31">48565878 * 578453</text:p>
          <text:list>
            <text:list-item>
              <text:p text:style-name="P31">28093077826734</text:p>
            </text:list-item>
          </text:list>
        </text:list-item>
        <text:list-item>
          <text:p text:style-name="P31">2 ** 8</text:p>
          <text:list>
            <text:list-item>
              <text:p text:style-name="P31">256</text:p>
            </text:list-item>
          </text:list>
        </text:list-item>
        <text:list-item>
          <text:p text:style-name="P31">23 / 7</text:p>
          <text:list>
            <text:list-item>
              <text:p text:style-name="P31">3.2857142857142856</text:p>
            </text:list-item>
          </text:list>
        </text:list-item>
        <text:list-item>
          <text:p text:style-name="P31">23 // 7</text:p>
          <text:list>
            <text:list-item>
              <text:p text:style-name="P31">3</text:p>
            </text:list-item>
            <text:list-item>
              <text:p text:style-name="P31">A divisão exata só retorna a parte inteira do número</text:p>
            </text:list-item>
          </text:list>
        </text:list-item>
        <text:list-item>
          <text:p text:style-name="P31">2 <text:s text:c="3"/>+ <text:s text:c="3"/>2</text:p>
          <text:list>
            <text:list-item>
              <text:p text:style-name="P58">4</text:p>
            </text:list-item>
            <text:list-item>
              <text:p text:style-name="P58">Os espaços entre os valores e o operador não fez diferença</text:p>
            </text:list-item>
          </text:list>
        </text:list-item>
        <text:list-item>
          <text:p text:style-name="P31">(5 - 1) * ((7 + 1) / (3 - 1))</text:p>
          <text:list>
            <text:list-item>
              <text:p text:style-name="P58">16.0</text:p>
            </text:list-item>
            <text:list-item>
              <text:p text:style-name="P58">Nesse caso, fica evidente que o Python faz a parte mais difícil, já que ele vai pegando cada parte da expressão para retornar o valor final</text:p>
            </text:list-item>
          </text:list>
        </text:list-item>
      </text:list>
      <text:p text:style-name="P57"><draw:frame draw:style-name="fr1" draw:name="Figura1" text:anchor-type="char" svg:x="6.07cm" svg:y="0.145cm" svg:width="4.761cm" svg:height="5.26cm" draw:z-index="0"><draw:image xlink:href="Pictures/10000000000001B6000001E451B433FAE2DAAF6E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57"/>
      <text:p text:style-name="P30"><text:span text:style-name="T2"><text:tab/>Todas essas regras envolvendo valores e operadores, para compor expressões </text:span><text:span text:style-name="T34">e declarações</text:span><text:span text:style-name="T2">, são fundamentais em Python. </text:span>São análogos às regras gramaticais de uma linguagem humana, como o português ou o inglês. Uma frase escrita de forma errada dificulta a compreensão, da mesma forma acontece com Python. Quando o interpretador Python não entende a instrução, ele informará um erro no que foi escrito. Exemplos de instruções erradas em Python, com suas mensagens de erro:</text:p>
      <text:list xml:id="list2383447939" text:style-name="L10">
        <text:list-item>
          <text:p text:style-name="P32">5 + </text:p>
          <text:list>
            <text:list-item>
              <text:p text:style-name="P32">File "&lt;python-input-12&gt;", line 1 5 + ^ SyntaxError: invalid syntax</text:p>
            </text:list-item>
          </text:list>
        </text:list-item>
        <text:list-item>
          <text:p text:style-name="P32">42 + 5 + * 2</text:p>
          <text:list>
            <text:list-item>
              <text:p text:style-name="P32">File "&lt;python-input-13&gt;", line 1 42 + 5 + * 2 ^ SyntaxError: invalid syntax</text:p>
            </text:list-item>
          </text:list>
        </text:list-item>
      </text:list>
      <text:list xml:id="list165953502920523" text:continue-list="list165952508672210" text:style-name="L1">
        <text:list-item>
          <text:p text:style-name="P3">Os Tipos de Dados Inteiro, Ponto Flutuante e String</text:p>
        </text:list-item>
      </text:list>
      <text:p text:style-name="P33"><text:span text:style-name="T5"><text:tab/>Como mencionado anteriormente, expressões são basicamente valores combinados com operadores para poderem retornar um valor. </text:span><text:span text:style-name="T7">Dito isso, cada </text:span>valor possui um tipo de categoria, conhecida como tipo de dados. Cada valor pertence a um tipo de dados. <text:span text:style-name="T5">Os tipos de dados mais comuns e primitivos do Python são os seguintes: </text:span><text:span text:style-name="T7">inteiro; ponto flutuante; e string.</text:span></text:p>
      <text:list xml:id="list165953854030002" text:continue-numbering="true" text:style-name="L1">
        <text:list-item>
          <text:list>
            <text:list-item>
              <text:p text:style-name="P4">Inteiro</text:p>
            </text:list-item>
          </text:list>
        </text:list-item>
      </text:list>
      <text:p text:style-name="P34"><text:tab/><text:tab/>O dado do tipo inteiro indica valores compostos inteiramente por números inteiros, <text:tab/>como o nome sugere. Os valores -2 e 30, por exemplo, são valores do tipo inteiro, do tipo de <text:tab/>dados inteiro. Outros exemplos de valores inteiros:</text:p>
      <text:list xml:id="list3041341285" text:style-name="L11">
        <text:list-item>
          <text:p text:style-name="P35">-<text:span text:style-name="T18">2</text:span></text:p>
        </text:list-item>
        <text:list-item>
          <text:p text:style-name="P35">-<text:span text:style-name="T18">1</text:span></text:p>
        </text:list-item>
        <text:list-item>
          <text:p text:style-name="P59">0</text:p>
        </text:list-item>
        <text:list-item>
          <text:p text:style-name="P59">1</text:p>
        </text:list-item>
        <text:list-item>
          <text:p text:style-name="P59">2</text:p>
        </text:list-item>
        <text:list-item>
          <text:p text:style-name="P59">3</text:p>
        </text:list-item>
        <text:list-item>
          <text:p text:style-name="P59">4</text:p>
        </text:list-item>
        <text:list-item>
          <text:p text:style-name="P16">5</text:p>
        </text:list-item>
      </text:list>
      <text:list xml:id="list165953225560484" text:continue-list="list165953854030002" text:style-name="L1">
        <text:list-item>
          <text:list>
            <text:list-item>
              <text:p text:style-name="P60"><text:span text:style-name="T3">Ponto Flutuante (</text:span><text:span text:style-name="T10">Float</text:span><text:span text:style-name="T12">)</text:span></text:p>
            </text:list-item>
          </text:list>
        </text:list-item>
      </text:list>
      <text:p text:style-name="P34"><text:span text:style-name="T14"><text:tab/><text:tab/>O dado do tipo ponto flutuante, conhecido também como </text:span><text:span text:style-name="T11">float</text:span><text:span text:style-name="T14">, indica valores <text:tab/>compostos inteiramente por números com casas decimais. O valor 3.14, por exemplo, é um <text:tab/>valor do tipo ponto flutuante, do tipo de dados ponto flutuante. A vírgula, ou casa decimal, é <text:tab/>essencial para diferenciar o número inteiro do número de ponto flutuante. </text:span><text:span text:style-name="T12">Mesmo que 42 <text:tab/>seja um valor do tipo inteiro, 42.0 já seria um valor do tipo ponto flutuante.</text:span></text:p>
      <text:p text:style-name="P21"><text:soft-page-break/><text:tab/><text:tab/>Outros exemplos de valores de ponto flutuante:</text:p>
      <text:list xml:id="list2535811849" text:style-name="L12">
        <text:list-item>
          <text:p text:style-name="P36"><text:span text:style-name="T12">-</text:span><text:span text:style-name="T13">1.25</text:span></text:p>
        </text:list-item>
        <text:list-item>
          <text:p text:style-name="P22">1.0</text:p>
        </text:list-item>
        <text:list-item>
          <text:p text:style-name="P22">0.5</text:p>
        </text:list-item>
        <text:list-item>
          <text:p text:style-name="P22">1.0</text:p>
        </text:list-item>
        <text:list-item>
          <text:p text:style-name="P22">1.25</text:p>
        </text:list-item>
      </text:list>
      <text:p text:style-name="P34"><text:span text:style-name="T13"><text:tab/><text:tab/></text:span><text:span text:style-name="T12">Deve-se ter atenção aos programadores que usam "número" para se referir tanto a <text:tab/>números inteiros quanto a números de ponto flutuante. Por mais que seja algo comum, a <text:tab/>linguagem Python não tem um tipo de dados "number" de forma nativa.</text:span></text:p>
      <text:p text:style-name="P34"><text:span text:style-name="T12"><text:tab/><text:tab/>Qualquer operação matemática entre um valor inteiro e um valor de ponto flutuante <text:tab/>resultará em um valor de ponto flutuante. 3 + 4 resulta em 7, mas 3 + 4.0 resulta em 7.0, e <text:tab/>não em 7. É uma diferença singela, mas ainda assim, faz diferença. </text:span><text:span text:style-name="T13">Q</text:span><text:span text:style-name="T12">ualquer divisão entre <text:tab/>dois inteiros com o operador de divisão comum (/) <text:tab/>resultará em um valor de ponto flutuante. <text:tab/>16 / 4 resulta em 4.0, e não em 4.</text:span></text:p>
      <text:list xml:id="list165953844031641" text:continue-list="list165953225560484" text:style-name="L1">
        <text:list-item>
          <text:list>
            <text:list-item>
              <text:p text:style-name="P23">String</text:p>
            </text:list-item>
          </text:list>
        </text:list-item>
      </text:list>
      <text:p text:style-name="P33"><text:span text:style-name="T18"><text:tab/><text:tab/></text:span>O dado do tipo string indica valores textuais, ou seja, texto, basicamente. Strings, <text:tab/>como também podemos chamar, são cadeias de caracteres. Elas sempre começam com aspas <text:tab/>simples (') e terminam com aspas simples ('). São essas aspas que delimitam onde começa e <text:tab/>termina a string. Exemplos de strings:</text:p>
      <text:list xml:id="list2129839473" text:style-name="L13">
        <text:list-item>
          <text:p text:style-name="P37">'Hello'</text:p>
        </text:list-item>
        <text:list-item>
          <text:p text:style-name="P37">'Goodbye cruel world!'</text:p>
        </text:list-item>
      </text:list>
      <text:p text:style-name="P33"><text:tab/><text:tab/>É possível ter uma string sem caracteres, chamada de string vazia ou string em <text:tab/>branco, <text:span text:style-name="T19">como essa → ‘’</text:span></text:p>
      <text:list xml:id="list165953616490614" text:continue-list="list165953844031641" text:style-name="L1">
        <text:list-item>
          <text:p text:style-name="P3">Concatenação e Replicação de Strings</text:p>
        </text:list-item>
      </text:list>
      <text:p text:style-name="P38"><text:span text:style-name="T5"><text:tab/></text:span>Expressões, tipos de dados e operadores podem parecer confusos no início, mas só no início mesmo. A medida que você evolui, você se torna capaz de construir programas cada vez mais sofisticados. <text:span text:style-name="T35">Tendo isso em mente,</text:span> <text:span text:style-name="T35">a</text:span><text:span text:style-name="T5"> funcionalidade de um operador pode mudar de acordo com o tipo de dados do valor utilizado na expressão.</text:span></text:p>
      <text:list xml:id="list165953456734837" text:continue-numbering="true" text:style-name="L1">
        <text:list-item>
          <text:list>
            <text:list-item>
              <text:p text:style-name="P5">Concatenação de Strings</text:p>
            </text:list-item>
          </text:list>
        </text:list-item>
      </text:list>
      <text:p text:style-name="P39"><text:span text:style-name="T8"><text:tab/><text:tab/>O + é o operador de adição ao se utilizar dois valores numéricos, ou seja, dois <text:tab/>valores do tipo inteiro ou do tipo ponto flutuante. </text:span>Contudo, quando estamos trabalhando <text:tab/>com dois valores do tipo string, as duas strings são unidas em uma só. As duas cadeias de <text:tab/>caracteres criam uma nova cadeia de caracteres com elas, num processo chamado de <text:tab/>concatenação. Exemplos:</text:p>
      <text:list xml:id="list582414879" text:style-name="L14">
        <text:list-item>
          <text:p text:style-name="P40">‘<text:span text:style-name="T19">Alice’ + ‘Bob’</text:span></text:p>
          <text:list>
            <text:list-item>
              <text:p text:style-name="P40"><text:soft-page-break/>‘<text:span text:style-name="T19">AliceBob’</text:span></text:p>
            </text:list-item>
          </text:list>
        </text:list-item>
      </text:list>
      <text:p text:style-name="P39"><text:tab/><text:tab/>A expressão retornou um valor que uniu o texto das duas strings. Apesar desse <text:tab/>comportamento, o operador + não deve ser usado quando um valor é do tipo numérico e <text:tab/>outro é do tipo string. Caso isso seja feito, um erro será gerado. <text:span text:style-name="T19">Exemplo:</text:span></text:p>
      <text:list xml:id="list570587829" text:style-name="L15">
        <text:list-item>
          <text:p text:style-name="P41">'Alice' + 42</text:p>
          <text:list>
            <text:list-item>
              <text:p text:style-name="P41">Traceback (most recent call last): File "&lt;python-input-11&gt;", line 1, in &lt;module&gt; 'Alice' + 42 ~~~~~~~~^~~~ TypeError: can only concatenate str (not "int") to str</text:p>
            </text:list-item>
          </text:list>
        </text:list-item>
      </text:list>
      <text:p text:style-name="P39"><text:tab/><text:tab/>Nesses casos, um dos valores da expressão precisa ser convertido. O valor do tipo <text:tab/>inteiro ou ponto flutuante precisará virar string, ou a string precisará virar do tipo inteiro ou <text:tab/>ponto flutuante.</text:p>
      <text:list xml:id="list165953650954967" text:continue-list="list165953456734837" text:style-name="L1">
        <text:list-item>
          <text:list>
            <text:list-item>
              <text:p text:style-name="P5">Replicação de Strings</text:p>
            </text:list-item>
          </text:list>
        </text:list-item>
      </text:list>
      <text:p text:style-name="P39"><text:span text:style-name="T8"><text:tab/><text:tab/>O * é o operador de multiplicação ao se utilizar valores numéricos, ou seja, dois <text:tab/>valores do tipo inteiro ou do tipo ponto flutuante. </text:span>Contudo, quando estamos trabalhando <text:tab/>com um valor do tipo string, e o outro valor do tipo inteiro ou ponto flutuante, a string é <text:tab/>replicada. Isso quer dizer que a string será replicada nela mesma a quantidade de vezes <text:tab/>referente ao valor do número. <text:span text:style-name="T19">Exemplo:</text:span></text:p>
      <text:list xml:id="list3107542144" text:style-name="L16">
        <text:list-item>
          <text:p text:style-name="P42">'Alice' * 5</text:p>
          <text:list>
            <text:list-item>
              <text:p text:style-name="P42">'AliceAliceAliceAliceAlice'</text:p>
            </text:list-item>
          </text:list>
        </text:list-item>
      </text:list>
      <text:p text:style-name="P39"><text:tab/><text:tab/>A expressão retornou um único valor string que repete a string original equivalente <text:tab/>ao número inteiro da expressão. E<text:span text:style-name="T22">sse operador</text:span> só pode ser usado com dois valores <text:tab/>numéricos (para multiplicação), ou com um valor string e um valor inteiro (para replicação). <text:tab/>Caso contrário, o Python informará que houve um erro. Exemplos:</text:p>
      <text:list xml:id="list2926576575" text:style-name="L17">
        <text:list-item>
          <text:p text:style-name="P43">'Alice' * 'Bob'</text:p>
          <text:list>
            <text:list-item>
              <text:p text:style-name="P43">Traceback (most recent call last): File "&lt;python-input-13&gt;", line 1, in &lt;module&gt; 'Alice' * 'Bob' ~~~~~~~~^~~~~~~ TypeError: can't multiply sequence by non-int of type 'str'</text:p>
            </text:list-item>
          </text:list>
        </text:list-item>
        <text:list-item>
          <text:p text:style-name="P43">'Alice' * 5.0</text:p>
          <text:list>
            <text:list-item>
              <text:p text:style-name="P43">Traceback (most recent call last): File "&lt;python-input-14&gt;", line 1, in &lt;module&gt; 'Alice' * 5.0 ~~~~~~~~^~~~~ TypeError: can't multiply sequence by non-int of type 'float'</text:p>
            </text:list-item>
          </text:list>
        </text:list-item>
      </text:list>
      <text:list xml:id="list165952780846758" text:continue-list="list165953650954967" text:style-name="L1">
        <text:list-item>
          <text:p text:style-name="P3">Armazenando Valores em Variáveis</text:p>
        </text:list-item>
      </text:list>
      <text:p text:style-name="P44"><text:span text:style-name="T5"><text:tab/>Uma variável é como uma caixinha na memória de um computador, uma caixinha na qual é armazenado um valor. </text:span>Para usar o valor retornado de uma expressão mais adiante no seu código, você pode armazená-lo em uma variável. O armazenamento de valores em variáveis é conhecido <text:soft-page-break/>como uma declaração de atribuição. Uma declaração de atribuição consiste de três coisas, respectivamente:</text:p>
      <text:list xml:id="list2351687367" text:style-name="L18">
        <text:list-item>
          <text:p text:style-name="P45">O nome da variável</text:p>
        </text:list-item>
        <text:list-item>
          <text:p text:style-name="P45">O sinal de igual <text:span text:style-name="T20">(</text:span>Ele é o operador de atribuição<text:span text:style-name="T20">)</text:span></text:p>
        </text:list-item>
        <text:list-item>
          <text:p text:style-name="P45">O valor a ser armazenado</text:p>
        </text:list-item>
      </text:list>
      <text:p text:style-name="P44"><text:tab/>Ao fazer a declaração de atribuição, spam = 42, teremos uma variável chamada spam com o valor 42 armazenado nela.</text:p>
      <text:p text:style-name="P44"><draw:frame draw:style-name="fr1" draw:name="Figura2" text:anchor-type="char" svg:x="4.544cm" svg:y="0.048cm" svg:width="6.948cm" svg:height="6.066cm" draw:z-index="1"><draw:image xlink:href="Pictures/10000000000001AA0000017493177B158A1E245C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tab/><text:span text:style-name="T20">Exemplos:</text:span></text:p>
      <text:list xml:id="list1988974678" text:style-name="L19">
        <text:list-item>
          <text:p text:style-name="P46">spam = 40</text:p>
        </text:list-item>
        <text:list-item>
          <text:p text:style-name="P61">spam</text:p>
          <text:list>
            <text:list-item>
              <text:p text:style-name="P61">40</text:p>
            </text:list-item>
            <text:list-item>
              <text:p text:style-name="P46"><text:span text:style-name="T20">Nesse primeiro retorno, uma variável de nome spam é inicializada (criada) ao armazenar um valor nela. </text:span>Isso faz com que spam possa ser utilizada futuramente</text:p>
            </text:list-item>
          </text:list>
        </text:list-item>
        <text:list-item>
          <text:p text:style-name="P46">eggs = 2</text:p>
        </text:list-item>
        <text:list-item>
          <text:p text:style-name="P46">spam + eggs</text:p>
          <text:list>
            <text:list-item>
              <text:p text:style-name="P46">42</text:p>
            </text:list-item>
            <text:list-item>
              <text:p text:style-name="P46">Nesse segundo retorno, aconteceram duas coisas:</text:p>
              <text:list>
                <text:list-item>
                  <text:p text:style-name="P46">Foi criada uma nova variável, chamada eggs, armazenando o valor 2</text:p>
                </text:list-item>
                <text:list-item>
                  <text:p text:style-name="P46">O valor armazenado em spam, da expressão anterior, foi reaproveitado para compor a nova expressão. Com a nova expressão criada, foi possível retornar o valor da soma</text:p>
                </text:list-item>
              </text:list>
            </text:list-item>
          </text:list>
        </text:list-item>
        <text:list-item>
          <text:p text:style-name="P46">spam + eggs + spam</text:p>
          <text:list>
            <text:list-item>
              <text:p text:style-name="P46">82</text:p>
            </text:list-item>
            <text:list-item>
              <text:p text:style-name="P46">Nesse terceiro retorno, os valores armazenados nas duas variáveis foram reaproveitados para retornar um novo valor na soma</text:p>
            </text:list-item>
          </text:list>
        </text:list-item>
        <text:list-item>
          <text:p text:style-name="P46">spam = spam + 2 </text:p>
        </text:list-item>
        <text:list-item>
          <text:p text:style-name="P46"><text:soft-page-break/>spam</text:p>
          <text:list>
            <text:list-item>
              <text:p text:style-name="P46">42</text:p>
            </text:list-item>
            <text:list-item>
              <text:p text:style-name="P46">Nesse novo retorno, aconteceu algo novo</text:p>
              <text:list>
                <text:list-item>
                  <text:p text:style-name="P47">Quando foi utilizada uma declaração de atribuição novamente, mas para a mesma variável, o antigo valor é sobrescrito. Isso quer dizer que o antigo valor é esquecido e o valor especificado depois do sinal de igual será o novo valor a ser armazenado na variável.</text:p>
                </text:list-item>
                <text:list-item>
                  <text:p text:style-name="P47">O novo valor de spam é o próprio valor de spam mais 2. spam + 2 é uma expressão que retorna um novo valor. Nesse caso, o valor de spam deixa de ser 40 para ser 40 + 2, ou seja, 42</text:p>
                </text:list-item>
              </text:list>
            </text:list-item>
          </text:list>
        </text:list-item>
        <text:list-item>
          <text:p text:style-name="P47">spam = 'Hello'</text:p>
        </text:list-item>
        <text:list-item>
          <text:p text:style-name="P47">spam</text:p>
        </text:list-item>
        <text:list-item>
          <text:p text:style-name="P47">spam = 'Goodbye'</text:p>
        </text:list-item>
        <text:list-item>
          <text:p text:style-name="P47">spam</text:p>
          <text:list>
            <text:list-item>
              <text:p text:style-name="P47">'Hello'</text:p>
            </text:list-item>
            <text:list-item>
              <text:p text:style-name="P47">'Goodbye'</text:p>
              <text:list>
                <text:list-item>
                  <text:p text:style-name="P47">Mesmo caso de sobrescrita, mas com strings agora</text:p>
                </text:list-item>
              </text:list>
            </text:list-item>
          </text:list>
        </text:list-item>
      </text:list>
      <text:p text:style-name="P48"><draw:frame draw:style-name="fr1" draw:name="Figura3" text:anchor-type="char" svg:x="2.528cm" svg:y="-0.095cm" svg:width="6.814cm" svg:height="7.195cm" draw:z-index="2"><draw:image xlink:href="Pictures/1000000000000260000002823AA2DBC12C690234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tab/>É preciso criar o nome da variável antes de usá-la, e um bom nome de variável descreve o valor que a variável contém. Apesar das possibilidades infinitas de nomes, Python possui algumas restrições:</text:p>
      <text:list xml:id="list3106470826" text:style-name="L20">
        <text:list-item>
          <text:p text:style-name="P49">O nome da variável não pode ter espaços</text:p>
        </text:list-item>
        <text:list-item>
          <text:p text:style-name="P49">O nome da variável pode conter somente letras, números e caracter underscore (_)</text:p>
        </text:list-item>
        <text:list-item>
          <text:p text:style-name="P49">O nome da variável não pode começar com um número</text:p>
        </text:list-item>
        <text:list-item>
          <text:p text:style-name="P49">O nome da variável não pode conter uma palavra reservada da linguagem Python</text:p>
          <text:list>
            <text:list-item>
              <text:p text:style-name="P62">Exemplos:</text:p>
              <text:list>
                <text:list-item>
                  <text:p text:style-name="P62"><text:soft-page-break/>if</text:p>
                </text:list-item>
                <text:list-item>
                  <text:p text:style-name="P62">for</text:p>
                </text:list-item>
                <text:list-item>
                  <text:p text:style-name="P62">return</text:p>
                </text:list-item>
              </text:list>
            </text:list-item>
          </text:list>
        </text:list-item>
      </text:list>
      <text:p text:style-name="P48"><text:tab/>Exemplos de nomes de variáveis válidos em Python:</text:p>
      <text:list xml:id="list1628603697" text:style-name="L21">
        <text:list-item>
          <text:p text:style-name="P50">current_balance</text:p>
        </text:list-item>
        <text:list-item>
          <text:p text:style-name="P50">currentBalance</text:p>
        </text:list-item>
        <text:list-item>
          <text:p text:style-name="P50">account4</text:p>
        </text:list-item>
        <text:list-item>
          <text:p text:style-name="P50">_42</text:p>
        </text:list-item>
        <text:list-item>
          <text:p text:style-name="P50">TOTAL_SUM</text:p>
        </text:list-item>
        <text:list-item>
          <text:p text:style-name="P63">hello</text:p>
        </text:list-item>
      </text:list>
      <text:p text:style-name="P64"><text:tab/>Exemplos de nomes de variáveis inválidos em Python:</text:p>
      <text:list xml:id="list4229677004" text:style-name="L22">
        <text:list-item>
          <text:p text:style-name="P51"><text:span text:style-name="T21">current-balance (</text:span>Hífens não são permitidos<text:span text:style-name="T21">)</text:span></text:p>
        </text:list-item>
        <text:list-item>
          <text:p text:style-name="P65">current balance</text:p>
        </text:list-item>
        <text:list-item>
          <text:p text:style-name="P65">4account</text:p>
        </text:list-item>
        <text:list-item>
          <text:p text:style-name="P65">42</text:p>
        </text:list-item>
        <text:list-item>
          <text:p text:style-name="P51"><text:span text:style-name="T21">TOTAL_$UM (</text:span>Caracteres especiais não são permitidos<text:span text:style-name="T21">)</text:span></text:p>
        </text:list-item>
        <text:list-item>
          <text:p text:style-name="P51"><text:span text:style-name="T21">'hello' (</text:span>Caracteres especiais não são permitidos<text:span text:style-name="T21">)</text:span></text:p>
        </text:list-item>
      </text:list>
      <text:p text:style-name="P48"><text:tab/><text:span text:style-name="T15">Vale lembrar também que nomes de variáveis são </text:span><text:span text:style-name="T16">case sensitive, ou seja, um caracter maiúsculo ou minúsculo fazem diferença. </text:span><text:span text:style-name="T17">spam, SPAM, Spam, e sPaM são variáveis diferentes.</text:span></text:p>
      <text:list xml:id="list165953602640268" text:continue-list="list165952780846758" text:style-name="L1">
        <text:list-item>
          <text:p text:style-name="P3">Seu Primeiro Programa</text:p>
        </text:list-item>
      </text:list>
      <text:p text:style-name="P7"><text:tab/>Ao invés de usar o terminal ou a IDLE3 do Python, vamos usar um arquivo de texto e alguma IDE, seja o Mu, PyCharm ou VSCode. IDEs ou editores de texto não terão o &gt;&gt;&gt; presente no Python do terminal. Você precisa salvar o arquivo e executar. Segue o código e o que foi gerado na tela ao executá-lo:</text:p>
      <text:list xml:id="list2117238146" text:style-name="L23">
        <text:list-item>
          <text:p text:style-name="P11"><draw:frame draw:style-name="fr2" draw:name="Figura4" text:anchor-type="char" svg:width="13.917cm" svg:height="5.503cm" draw:z-index="3"><draw:image xlink:href="Pictures/100000010000020E000000D050BC917BCA95AB65.png" xlink:type="simple" xlink:show="embed" xlink:actuate="onLoad" draw:mime-type="image/png"/></draw:frame>Hello, world!</text:p>
        </text:list-item>
        <text:list-item>
          <text:p text:style-name="P11">What is your name?</text:p>
          <text:list>
            <text:list-item>
              <text:p text:style-name="P11">&gt;Luan</text:p>
            </text:list-item>
          </text:list>
        </text:list-item>
        <text:list-item>
          <text:p text:style-name="P11"><text:soft-page-break/>It is good to meet you, Luan</text:p>
        </text:list-item>
        <text:list-item>
          <text:p text:style-name="P11">The length of your name is:</text:p>
        </text:list-item>
        <text:list-item>
          <text:p text:style-name="P11">4</text:p>
        </text:list-item>
        <text:list-item>
          <text:p text:style-name="P11">What is your age?</text:p>
          <text:list>
            <text:list-item>
              <text:p text:style-name="P11">&gt;31</text:p>
            </text:list-item>
          </text:list>
        </text:list-item>
        <text:list-item>
          <text:p text:style-name="P11">You will be 32 in a year.</text:p>
        </text:list-item>
      </text:list>
      <text:p text:style-name="P24"><text:span text:style-name="T5"><text:tab/></text:span>Vamos destrinc<text:span text:style-name="T23">h</text:span>ar esse código linha por linha.</text:p>
      <text:list xml:id="list2439661232" text:style-name="L24">
        <text:list-item>
          <text:p text:style-name="P52"># This program says hello and asks for my name.</text:p>
          <text:list>
            <text:list-item>
              <text:p text:style-name="P52">Essa primeira linha é um comentário do código. Quando a linha de um código Python começar com um #, todo o resto da linha é ignorado. Os comentários servem para descrever ou relatar alguma observação necessária do cód<text:span text:style-name="T23">i</text:span>go. É bastante útil quando é necessário tirar uma linha do código que não esteja funcionando para poder entender o porquê disso</text:p>
            </text:list-item>
          </text:list>
        </text:list-item>
        <text:list-item>
          <text:p text:style-name="P53">print('Hello, world!')</text:p>
        </text:list-item>
        <text:list-item>
          <text:p text:style-name="P53">print('What is your name?') # Ask for their name.</text:p>
          <text:list>
            <text:list-item>
              <text:p text:style-name="P52">print('Hello, world!') significa dizer ao Python para imprimir na tela o texto na string 'Hello, world!'. Quando o Python executa essas linhas, ele chama a função print() através do valor passado em parênteses. Um valor passado dentre parênteses de uma função é chamado de parâmetro, ou argumento. Repare que as aspas simples da string não são exibidas.</text:p>
            </text:list-item>
            <text:list-item>
              <text:p text:style-name="P52">Ao executar arquivos Python, ou seja, arquivos no formato .py, sempre utilizaremos a função print() para exibir algo na tela. Os parênteses no fim definem o print() como uma função</text:p>
            </text:list-item>
          </text:list>
        </text:list-item>
        <text:list-item>
          <text:p text:style-name="P52">my_name = input('&gt;')</text:p>
          <text:list>
            <text:list-item>
              <text:p text:style-name="P52">A função input() espera o usuário digitar algo no teclado e apertar Enter. Essa função retorna uma string idêntica ao que foi digitado pelo usuário. O argumento da função input() serve apenas para exibir algo na tela, como nesse caso, de o de indicar para escrever algo. Tendo argumento ou não, ao executar um código Python com a função input(), o código aguardará o usuário digitar algo e apertar Enter. Nesse caso, a string gerada pela digitação do usuário é armazenada na variável my_name</text:p>
            </text:list-item>
          </text:list>
        </text:list-item>
        <text:list-item>
          <text:p text:style-name="P52">print('It is good to meet you, ' + my_name)</text:p>
          <text:list>
            <text:list-item>
              <text:p text:style-name="P52">Nessa chamada da função print(), temos, dentro dela, uma concatenação de strings. As duas strings a serem concatenadas são:</text:p>
              <text:list>
                <text:list-item>
                  <text:p text:style-name="P52">'It is good to meet you, '</text:p>
                </text:list-item>
                <text:list-item>
                  <text:p text:style-name="P52"><text:soft-page-break/>my_name <text:span text:style-name="T23">(a variável que armazena em string a entrada digitada pelo usuário, como já visto)</text:span></text:p>
                </text:list-item>
              </text:list>
            </text:list-item>
            <text:list-item>
              <text:p text:style-name="P52">No final, a expressão dentro do argumento da função print() retorna o seguinte na tela:</text:p>
              <text:list>
                <text:list-item>
                  <text:p text:style-name="P52">It is good to meet you, Luan</text:p>
                </text:list-item>
              </text:list>
            </text:list-item>
          </text:list>
        </text:list-item>
        <text:list-item>
          <text:p text:style-name="P52">print('The length of your name is:')</text:p>
        </text:list-item>
        <text:list-item>
          <text:p text:style-name="P52">print(len(my_name))</text:p>
          <text:list>
            <text:list-item>
              <text:p text:style-name="P52">A função len() recebe como argumento uma string (ou uma variável com um valor do tipo string) para retornar um número inteiro. Esse número inteiro é a quantidade de caracteres da string. <text:span text:style-name="T26">Exemplos:</text:span></text:p>
              <text:list>
                <text:list-item>
                  <text:p text:style-name="P52">print(len('hello')</text:p>
                  <text:list>
                    <text:list-item>
                      <text:p text:style-name="P52">5</text:p>
                    </text:list-item>
                  </text:list>
                </text:list-item>
                <text:list-item>
                  <text:p text:style-name="P52">print(len('My very energetic monster just scarfed nachos.'))</text:p>
                  <text:list>
                    <text:list-item>
                      <text:p text:style-name="P52">46</text:p>
                    </text:list-item>
                  </text:list>
                </text:list-item>
                <text:list-item>
                  <text:p text:style-name="P52">print(len(''))</text:p>
                  <text:list>
                    <text:list-item>
                      <text:p text:style-name="P52">0</text:p>
                    </text:list-item>
                  </text:list>
                </text:list-item>
              </text:list>
            </text:list-item>
            <text:list-item>
              <text:p text:style-name="P54">Assim como nesses exemplos, len(my_name) retorna um número inteiro. Ao receber o argumento, ela retorna o chamado valor de retorno da função. Com seu valor retornado, a função print() tem o papel de exibir esse valor na tela. Após fazer o print exibir na tela 'The length of your name is:', ocorre uma quebra de linha e um número é exibido na tela, <text:span text:style-name="T26">isto é, o retorno da função len()</text:span></text:p>
            </text:list-item>
          </text:list>
        </text:list-item>
        <text:list-item>
          <text:p text:style-name="P54">print('What is your age?') # Ask for their age.</text:p>
        </text:list-item>
        <text:list-item>
          <text:p text:style-name="P54">my_age = input('&gt;')</text:p>
        </text:list-item>
        <text:list-item>
          <text:p text:style-name="P54">print('You will be ' + str(int(my_age) + 1) + ' in a year.')</text:p>
          <text:list>
            <text:list-item>
              <text:p text:style-name="P54">É possível reparar nesse trecho do código uma função não utilizada antes, a função str(). Ao verificar a string de argumento na função print(), é possível notar que a string a ser exibida é resultado de uma concatenação.</text:p>
            </text:list-item>
            <text:list-item>
              <text:p text:style-name="P54">Como já mencionado, não é possível utilizar o operador + entre valores do tipo e string e valores do tipo inteiro ou ponto flutuante. É por isso que a função str() está no código, pois ela pode receber um valor inteiro, ou ponto flutuante, e retornar uma string. Exemplos:</text:p>
              <text:list>
                <text:list-item>
                  <text:p text:style-name="P54">str(29)</text:p>
                  <text:list>
                    <text:list-item>
                      <text:p text:style-name="P54">‘<text:span text:style-name="T26">29’</text:span></text:p>
                    </text:list-item>
                  </text:list>
                </text:list-item>
                <text:list-item>
                  <text:p text:style-name="P54">print('I am ' + str(29) + ' years old.')</text:p>
                  <text:list>
                    <text:list-item>
                      <text:p text:style-name="P54">'I am 29 years old.'</text:p>
                    </text:list-item>
                  </text:list>
                </text:list-item>
              </text:list>
            </text:list-item>
            <text:list-item>
              <text:p text:style-name="P54"><text:soft-page-break/>As funções str(), int() e float() retornam o valor em formato de string, inteiro e ponto flutuante do valor passado, respectivamente. Exemplos:</text:p>
              <text:list>
                <text:list-item>
                  <text:p text:style-name="P54">str(0)</text:p>
                  <text:list>
                    <text:list-item>
                      <text:p text:style-name="P54">'0'</text:p>
                    </text:list-item>
                  </text:list>
                </text:list-item>
                <text:list-item>
                  <text:p text:style-name="P54">str(-3.14)</text:p>
                  <text:list>
                    <text:list-item>
                      <text:p text:style-name="P54">'-3.14'</text:p>
                    </text:list-item>
                  </text:list>
                </text:list-item>
                <text:list-item>
                  <text:p text:style-name="P54">int('42')</text:p>
                  <text:list>
                    <text:list-item>
                      <text:p text:style-name="P54">42</text:p>
                    </text:list-item>
                  </text:list>
                </text:list-item>
                <text:list-item>
                  <text:p text:style-name="P54">int('-99')</text:p>
                  <text:list>
                    <text:list-item>
                      <text:p text:style-name="P54">-99</text:p>
                    </text:list-item>
                  </text:list>
                </text:list-item>
                <text:list-item>
                  <text:p text:style-name="P54">int(1.25)</text:p>
                  <text:list>
                    <text:list-item>
                      <text:p text:style-name="P54">1</text:p>
                    </text:list-item>
                  </text:list>
                </text:list-item>
                <text:list-item>
                  <text:p text:style-name="P54">int(1.99)</text:p>
                  <text:list>
                    <text:list-item>
                      <text:p text:style-name="P54">1</text:p>
                    </text:list-item>
                  </text:list>
                </text:list-item>
                <text:list-item>
                  <text:p text:style-name="P54">float('3.14')</text:p>
                  <text:list>
                    <text:list-item>
                      <text:p text:style-name="P54">3.14</text:p>
                    </text:list-item>
                  </text:list>
                </text:list-item>
                <text:list-item>
                  <text:p text:style-name="P54">float(10)</text:p>
                  <text:list>
                    <text:list-item>
                      <text:p text:style-name="P54">10.0</text:p>
                    </text:list-item>
                  </text:list>
                </text:list-item>
              </text:list>
            </text:list-item>
            <text:list-item>
              <text:p text:style-name="P54">Vale lembrar que caso esteja tentando retornar um valor, com o qual o valor passado não é compatível, um erro será informado. <text:span text:style-name="T27">Exemplos:</text:span></text:p>
              <text:list>
                <text:list-item>
                  <text:p text:style-name="P54">int('99.99')</text:p>
                  <text:list>
                    <text:list-item>
                      <text:p text:style-name="P54">Traceback (most recent call last):</text:p>
                    </text:list-item>
                    <text:list-item>
                      <text:p text:style-name="P54"><text:s text:c="2"/>File "&lt;python-input-43&gt;", line 1, in &lt;module&gt;</text:p>
                    </text:list-item>
                    <text:list-item>
                      <text:p text:style-name="P54"><text:s text:c="4"/>int('99.99')</text:p>
                    </text:list-item>
                    <text:list-item>
                      <text:p text:style-name="P54"><text:s text:c="4"/>~~~^^^^^^^^^</text:p>
                    </text:list-item>
                    <text:list-item>
                      <text:p text:style-name="P54">ValueError: invalid literal for int() with base 10: '99.99'</text:p>
                    </text:list-item>
                  </text:list>
                </text:list-item>
                <text:list-item>
                  <text:p text:style-name="P54">int('twelve')</text:p>
                  <text:list>
                    <text:list-item>
                      <text:p text:style-name="P54">Traceback (most recent call last):</text:p>
                    </text:list-item>
                    <text:list-item>
                      <text:p text:style-name="P54"><text:s text:c="2"/>File "&lt;python-input-44&gt;", line 1, in &lt;module&gt;</text:p>
                    </text:list-item>
                    <text:list-item>
                      <text:p text:style-name="P54"><text:s text:c="4"/>int('twelve')</text:p>
                    </text:list-item>
                    <text:list-item>
                      <text:p text:style-name="P54"><text:s text:c="4"/>~~~^^^^^^^^^^</text:p>
                    </text:list-item>
                    <text:list-item>
                      <text:p text:style-name="P54">ValueError: invalid literal for int() with base 10: 'twelve'</text:p>
                    </text:list-item>
                  </text:list>
                </text:list-item>
              </text:list>
            </text:list-item>
            <text:list-item>
              <text:p text:style-name="P54">No contexto do código, duas funções foram utilizadas, as funções int() e a função str(). A função int() está sendo utilizada para retornar o valor inteiro da variável my_age, <text:soft-page-break/><text:span text:style-name="T28">referente a entrada informada pelo usuário, ou seja, a função input(). Contudo, como já informado, a função input() gera uma string com a entrada informada pelo usuário</text:span></text:p>
            </text:list-item>
            <text:list-item>
              <text:p text:style-name="P54">Após transformar a string da variável my_age em um inteiro, soma-se com o valor mais 1. O valor retornado pela soma do retorno da função int() com 1 é passado para a função str(). Por fim, str() converte o valor inteiro em uma string para poder ser concatenada com a string maior da função print(). Vamos supor que a entrada de idade informada pelo usuário é 4. O passo a passo ficaria dessa forma:</text:p>
            </text:list-item>
          </text:list>
        </text:list-item>
      </text:list>
      <text:p text:style-name="P55"><draw:frame draw:style-name="fr1" draw:name="Figura5" text:anchor-type="char" svg:x="2.45cm" svg:y="0.026cm" svg:width="11.635cm" svg:height="7.368cm" draw:z-index="4"><draw:image xlink:href="Pictures/100000000000037900000233593DBEA02114DA6D.png" xlink:type="simple" xlink:show="embed" xlink:actuate="onLoad" draw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list xml:id="list165954012139281" text:continue-list="list165953602640268" text:style-name="L1">
        <text:list-item>
          <text:p text:style-name="P3">A função type()</text:p>
        </text:list-item>
      </text:list>
      <text:p text:style-name="P7"><text:tab/>Inteiros, pontos flutuantes (float) e strings não são os únicos tipos de dados existentes em Python. A medida que você se aprofunda em Python, você vai descobrindo mais e mais tipos de dados, <text:span text:style-name="T29">como vamos descobrindo passo a passo aqui. Para saber o tipo de dados de um valor (esteja ele dentro de uma variável ou não), basta usar a função type().</text:span></text:p>
      <text:p text:style-name="P7"><text:tab/>A função type() recebe um valor e retorna o tipo de dados do valor. Exemplos:</text:p>
      <text:list xml:id="list1528104279" text:style-name="L25">
        <text:list-item>
          <text:p text:style-name="P12">type(42)</text:p>
          <text:list>
            <text:list-item>
              <text:p text:style-name="P12">&lt;class 'int'&gt;</text:p>
            </text:list-item>
          </text:list>
        </text:list-item>
        <text:list-item>
          <text:p text:style-name="P12">type(42.0)</text:p>
          <text:list>
            <text:list-item>
              <text:p text:style-name="P12">&lt;class 'float'&gt;</text:p>
            </text:list-item>
          </text:list>
        </text:list-item>
        <text:list-item>
          <text:p text:style-name="P12">type('quarenta e dois')</text:p>
          <text:list>
            <text:list-item>
              <text:p text:style-name="P12">&lt;class 'str'&gt;</text:p>
            </text:list-item>
          </text:list>
        </text:list-item>
        <text:list-item>
          <text:p text:style-name="P12">name = 'Zophie'</text:p>
        </text:list-item>
        <text:list-item>
          <text:p text:style-name="P12">type(name)</text:p>
          <text:list>
            <text:list-item>
              <text:p text:style-name="P12">&lt;class 'str'&gt;</text:p>
            </text:list-item>
          </text:list>
        </text:list-item>
      </text:list>
      <text:list xml:id="list165952868292782" text:continue-list="list165954012139281" text:style-name="L1">
        <text:list-item>
          <text:p text:style-name="P3">As funções round() e abs()</text:p>
        </text:list-item>
      </text:list>
      <text:p text:style-name="P7"><text:soft-page-break/><text:tab/>Outras duas funções importantíssimas, considerando cálculos matemáticos, são a função round() e a função abs(). A função round() precisa receber como argumento um valor do tipo float para, assim, retornar o número inteiro mais próximo. Exemplos:</text:p>
      <text:list xml:id="list2736377534" text:style-name="L26">
        <text:list-item>
          <text:p text:style-name="P13">round(3.14)</text:p>
          <text:list>
            <text:list-item>
              <text:p text:style-name="P17">3</text:p>
            </text:list-item>
          </text:list>
        </text:list-item>
        <text:list-item>
          <text:p text:style-name="P17">round(7.7)</text:p>
          <text:list>
            <text:list-item>
              <text:p text:style-name="P17">8</text:p>
            </text:list-item>
          </text:list>
        </text:list-item>
        <text:list-item>
          <text:p text:style-name="P17">round(-2.2)</text:p>
          <text:list>
            <text:list-item>
              <text:p text:style-name="P17">-2</text:p>
            </text:list-item>
          </text:list>
        </text:list-item>
      </text:list>
      <text:p text:style-name="P18"><text:tab/>É possível também passar um segundo argumento opcional, informando quantas casas decimais de aproximação você deseja. Exemplos:</text:p>
      <text:list xml:id="list2230186199" text:style-name="L27">
        <text:list-item>
          <text:p text:style-name="P19">round(3.14, 1)</text:p>
          <text:list>
            <text:list-item>
              <text:p text:style-name="P19">3.1</text:p>
            </text:list-item>
          </text:list>
        </text:list-item>
        <text:list-item>
          <text:p text:style-name="P19">round(7.7777, 3)</text:p>
          <text:list>
            <text:list-item>
              <text:p text:style-name="P19">7.778</text:p>
            </text:list-item>
          </text:list>
        </text:list-item>
      </text:list>
      <text:p text:style-name="P18"><text:tab/>A função abs() precisa receber como argumento um valor do tipo float ou inteiro para retornar o seu valor absoluto. O valor absoluto de um número nada mais é que a distância dele de zero, em outras palavras, o valor positivo dele. Exemplos:</text:p>
      <text:list xml:id="list1778490251" text:style-name="L28">
        <text:list-item>
          <text:p text:style-name="P20">abs(25)</text:p>
          <text:list>
            <text:list-item>
              <text:p text:style-name="P20">25</text:p>
            </text:list-item>
          </text:list>
        </text:list-item>
        <text:list-item>
          <text:p text:style-name="P20">abs(-25)</text:p>
          <text:list>
            <text:list-item>
              <text:p text:style-name="P20">25</text:p>
            </text:list-item>
          </text:list>
        </text:list-item>
        <text:list-item>
          <text:p text:style-name="P20">abs(-3.14)</text:p>
          <text:list>
            <text:list-item>
              <text:p text:style-name="P20">3.14</text:p>
            </text:list-item>
          </text:list>
        </text:list-item>
        <text:list-item>
          <text:p text:style-name="P20">abs(0)</text:p>
          <text:list>
            <text:list-item>
              <text:p text:style-name="P20">0</text:p>
            </text:list-item>
          </text:list>
        </text:list-item>
      </text:list>
      <text:list xml:id="list165952523071742" text:continue-list="list165952868292782" text:style-name="L1">
        <text:list-item>
          <text:p text:style-name="P3">Como os Computadores Armazenam Dados com Números Binários</text:p>
        </text:list-item>
      </text:list>
      <text:p text:style-name="P14"><text:tab/>Para entender como o computador transforma as instruções em resultados, é preciso entender como um computador funciona. Em filmes de hackers, vemos diversos 0s e 1s na tela, mas o que será que eles representam? Esse conjunto de zeros e uns são o sistema de numeração binária, também chamados de sistema numérico de base 2.</text:p>
      <text:p text:style-name="P14"><text:tab/>O sistema binário pode representar todos os números representados pelo sistema numérico que usamos, ou seja, o sistema decimal. Nosso sistema numérico possui 10 dígitos, indo de 0 a 9, enquanto que o sistema binário possui apenas 0 e 1. Para representar o mesmo valor decimal através da base 2, ou seja, da base binária, é necessário um conjunto distinto de 0s e 1s.</text:p>
      <text:p text:style-name="P14"><draw:frame draw:style-name="fr1" draw:name="Figura6" text:anchor-type="char" svg:x="1.993cm" svg:y="0.026cm" svg:width="2.589cm" svg:height="4.537cm" draw:z-index="5"><draw:image xlink:href="Pictures/1000000000000123000001FE95227617038EEBA3.png" xlink:type="simple" xlink:show="embed" xlink:actuate="onLoad" draw:mime-type="image/png"/></draw:frame><draw:frame draw:style-name="fr1" draw:name="Figura7" text:anchor-type="char" svg:x="5.447cm" svg:y="0.175cm" svg:width="2.685cm" svg:height="4.487cm" draw:z-index="6"><draw:image xlink:href="Pictures/1000000000000131000001FE9D36B6CFEB3FB0B6.png" xlink:type="simple" xlink:show="embed" xlink:actuate="onLoad" draw:mime-type="image/png"/></draw:frame><draw:frame draw:style-name="fr1" draw:name="Figura8" text:anchor-type="char" svg:x="9.176cm" svg:y="0.171cm" svg:width="2.66cm" svg:height="4.447cm" draw:z-index="7"><draw:image xlink:href="Pictures/1000000000000131000001FEEA4E4AD44216CE59.png" xlink:type="simple" xlink:show="embed" xlink:actuate="onLoad" draw:mime-type="image/png"/></draw:frame><text:soft-page-break/></text:p>
      <text:p text:style-name="P14"><text:s text:c="5"/></text:p>
      <text:p text:style-name="P14"/>
      <text:p text:style-name="P14"/>
      <text:p text:style-name="P14"/>
      <text:p text:style-name="P14"/>
      <text:p text:style-name="P1"><text:span text:style-name="T25"><text:tab/></text:span></text:p>
      <text:p text:style-name="P1"><text:span text:style-name="T25"><text:tab/>É mais simples de se usar o sistema binário em computadores por haver apenas dois estados. </text:span><text:span text:style-name="T24">Isso se aplica em diversos contextos, sempre havendo apenas dois estados. DVDs possuem regiões da sua parte mais sensível que refletem o laser do disco, e outras que não. Circuitos eletrônicos possuem fluxos em que passam eletricidade e fluxos que não passam. Seria caro demais utilizar um equipamento que, assim como no sistema decimal, possuiria dez estados diferentes.</text:span></text:p>
      <text:p text:style-name="P14"><text:tab/>Os digitos binários são comumente chamados de bits. 1 bit pode representar dois números, ou seja, 0 ou 1, enquanto 8 bits podem representar 2⁸ números, ou seja, 256 números. 2⁸ representa os números de 0 a 255, ou de 0 a 11111111 no sistema binário. 8 bits costumam ser referidos como 1 byte. Os arquivos presentes em um computador costumam ser medidos em bytes.</text:p>
      <text:list xml:id="list462880927" text:style-name="L29">
        <text:list-item>
          <text:p text:style-name="P15">1 kilobyte (KB) é 2¹⁰, ou 1024 bytes</text:p>
        </text:list-item>
        <text:list-item>
          <text:p text:style-name="P15">1 megabyte (MB) é 2²⁰, ou 1048576 bytes (ou 1024KB)</text:p>
        </text:list-item>
        <text:list-item>
          <text:p text:style-name="P15">1 gigabyte (GB) é 2³⁰, ou 1073741824 bytes (ou 1024MB)</text:p>
        </text:list-item>
        <text:list-item>
          <text:p text:style-name="P15">1 terabyte (TB) é 2⁴⁰, ou 1099511627776 bytes (ou 1024GB)</text:p>
        </text:list-item>
      </text:list>
      <text:p text:style-name="P14"><text:s/><text:tab/>Existe uma vasta quantidade de dados a serem armazenados em bits, sejam arquivos, imagens, músicas e todo tipo de informaçã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everMind" svg:font-family="NeverMind, sans-serif, 'Microsoft YaHei', 'PingFang SC', 'Microsoft JhengHei', 'Apple Color Emoji', 'Segoe UI Emoji', 'Segoe UI Symbol', 'Noto Color Emoj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6T12:04:54.302639479</meta:creation-date>
    <dc:date>2026-05-14T16:59:52.272433799</dc:date>
    <meta:editing-duration>PT18H49M16S</meta:editing-duration>
    <meta:editing-cycles>39</meta:editing-cycles>
    <meta:generator>LibreOffice/7.3.7.2$Linux_X86_64 LibreOffice_project/30$Build-2</meta:generator>
    <meta:document-statistic meta:table-count="0" meta:image-count="8" meta:object-count="0" meta:page-count="15" meta:paragraph-count="287" meta:word-count="3962" meta:character-count="22222" meta:non-whitespace-character-count="18642"/>
  </office:meta>
</office:document-meta>
</file>